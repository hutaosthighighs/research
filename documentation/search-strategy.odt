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987a3" officeooo:paragraph-rsid="000987a3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normal" officeooo:rsid="000987a3" officeooo:paragraph-rsid="000987a3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987a3" officeooo:paragraph-rsid="000987a3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987a3" officeooo:paragraph-rsid="000987a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a5b4a" officeooo:paragraph-rsid="000a5b4a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987a3" officeooo:paragraph-rsid="000987a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font-size="12pt" fo:letter-spacing="normal" fo:font-style="normal" fo:font-weight="normal" officeooo:rsid="000987a3" officeooo:paragraph-rsid="000987a3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officeooo:paragraph-rsid="000987a3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cf0e7" officeooo:paragraph-rsid="000cf0e7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d4109" officeooo:paragraph-rsid="000d4109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d4109" officeooo:paragraph-rsid="000e7074" style:font-size-asian="10.5pt" style:font-weight-asian="normal" style:font-size-complex="12pt" style:font-weight-complex="normal"/>
    </style:style>
    <style:style style:name="T1" style:family="text">
      <style:text-properties officeooo:rsid="000a5b4a"/>
    </style:style>
    <style:style style:name="T2" style:family="text">
      <style:text-properties officeooo:rsid="000d4109"/>
    </style:style>
    <style:style style:name="T3" style:family="text">
      <style:text-properties fo:font-style="italic" officeooo:rsid="000a5b4a" style:font-style-asian="italic" style:font-style-complex="italic"/>
    </style:style>
    <style:style style:name="T4" style:family="text">
      <style:text-properties officeooo:rsid="000abe29"/>
    </style:style>
    <style:style style:name="T5" style:family="text">
      <style:text-properties fo:font-style="italic" officeooo:rsid="000abe29" style:font-style-asian="italic" style:font-style-complex="italic"/>
    </style:style>
    <style:style style:name="T6" style:family="text">
      <style:text-properties fo:font-style="normal" officeooo:rsid="000abe29" style:font-style-asian="normal" style:font-style-complex="normal"/>
    </style:style>
    <style:style style:name="T7" style:family="text">
      <style:text-properties fo:font-style="normal" officeooo:rsid="000c379f" style:font-style-asian="normal" style:font-style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variant="normal" fo:text-transform="none" fo:letter-spacing="normal" fo:font-style="normal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ize="12pt" fo:font-weight="normal" officeooo:rsid="000987a3" style:font-size-asian="10.5pt" style:font-weight-asian="normal" style:font-size-complex="12pt" style:font-weight-complex="normal"/>
    </style:style>
    <style:style style:name="T14" style:family="text">
      <style:text-properties fo:color="#c9211e" loext:opacity="100%" officeooo:rsid="000c379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t A.5 – Search strategy</text:p>
      <text:p text:style-name="P2"/>
      <text:p text:style-name="P3">Notes:</text:p>
      <text:p text:style-name="P4"><text:tab/>This document is only made to document the research process.</text:p>
      <text:p text:style-name="P4"/>
      <text:p text:style-name="P4"><text:tab/><text:span text:style-name="T1">For proper cit</text:span><text:span text:style-name="T2">ation</text:span><text:span text:style-name="T1"> you can use </text:span><text:a xlink:type="simple" xlink:href="https://www.citationmachine.net/apa/cite-a-journal/custom" text:style-name="Internet_20_link" text:visited-style-name="Visited_20_Internet_20_Link"><text:span text:style-name="T3">citation machine</text:span></text:a><text:span text:style-name="T1"> (only the first use is free) or </text:span><text:span text:style-name="T4">the </text:span><text:span text:style-name="T5">Purdue writing lab </text:span><text:a xlink:type="simple" xlink:href="https://owl.purdue.edu/owl/research_and_citation/apa_style/apa_formatting_and_style_guide/in_text_citations_the_basics.html" text:style-name="Internet_20_link" text:visited-style-name="Visited_20_Internet_20_Link"><text:span text:style-name="T6">here</text:span></text:a><text:span text:style-name="T6">. </text:span><text:span text:style-name="T7">Knowing the APA7 style is still important.</text:span></text:p>
      <text:p text:style-name="P4"><text:tab/></text:p>
      <text:p text:style-name="P5"><text:tab/>Might as well use ChatGPT for convenience (I didn’t <text:span text:style-name="T2">use</text:span> it yet)</text:p>
      <text:p text:style-name="P4"/>
      <text:p text:style-name="P4"><text:span text:style-name="T8">Databases used:</text:span><text:line-break/><text:tab/><text:a xlink:type="simple" xlink:href="https://biblio.vub.ac.be/iguana/www.main.cls?surl=vub" text:style-name="Internet_20_link" text:visited-style-name="Visited_20_Internet_20_Link">VUB Library</text:a></text:p>
      <text:p text:style-name="P4"><text:tab/><text:a xlink:type="simple" xlink:href="https://scholar.google.com/schhp?hl=en&amp;as_sdt=0,5" text:style-name="Internet_20_link" text:visited-style-name="Visited_20_Internet_20_Link">Google scholar</text:a></text:p>
      <text:p text:style-name="P4"/>
      <text:p text:style-name="P6">Starting reference:</text:p>
      <text:p text:style-name="P4"/>
      <text:p text:style-name="P4"><text:span text:style-name="T9">Blinder,</text:span><text:span text:style-name="T10"> </text:span><text:span text:style-name="T9">A.</text:span><text:span text:style-name="T10"> </text:span><text:span text:style-name="T9">S.,</text:span><text:span text:style-name="T10"> </text:span><text:span text:style-name="T9">Ehrmann,</text:span><text:span text:style-name="T10"> </text:span><text:span text:style-name="T9">M.,</text:span><text:span text:style-name="T10"> </text:span><text:span text:style-name="T9">Fratzscher,</text:span><text:span text:style-name="T10"> </text:span><text:span text:style-name="T9">M.,</text:span><text:span text:style-name="T10"> </text:span><text:span text:style-name="T9">De</text:span><text:span text:style-name="T10"> </text:span><text:span text:style-name="T9">Haan,</text:span><text:span text:style-name="T10"> </text:span><text:span text:style-name="T9">J.,</text:span><text:span text:style-name="T10"> </text:span><text:span text:style-name="T9">&amp;</text:span><text:span text:style-name="T10"> </text:span><text:span text:style-name="T9">Jansen,</text:span><text:span text:style-name="T10"> </text:span><text:span text:style-name="T9">D.</text:span><text:span text:style-name="T10"> </text:span><text:span text:style-name="T9">J.</text:span><text:span text:style-name="T10"> </text:span><text:span text:style-name="T9">(2008).</text:span><text:span text:style-name="T10"> </text:span><text:span text:style-name="T9">Central</text:span><text:span text:style-name="T10"> </text:span><text:span text:style-name="T9">bank</text:span><text:line-break/><text:span text:style-name="T9">communication</text:span><text:span text:style-name="T10"> </text:span><text:span text:style-name="T9">and</text:span><text:span text:style-name="T10"> </text:span><text:span text:style-name="T9">monetary</text:span><text:span text:style-name="T10"> </text:span><text:span text:style-name="T9">policy:</text:span><text:span text:style-name="T10"> </text:span><text:span text:style-name="T9">A</text:span><text:span text:style-name="T10"> </text:span><text:span text:style-name="T9">survey</text:span><text:span text:style-name="T10"> </text:span><text:span text:style-name="T9">of</text:span><text:span text:style-name="T10"> </text:span><text:span text:style-name="T9">theory</text:span><text:span text:style-name="T10"> </text:span><text:span text:style-name="T9">and</text:span><text:span text:style-name="T10"> </text:span><text:span text:style-name="T9">evidence.</text:span><text:span text:style-name="T10"> </text:span><text:span text:style-name="T11">Journal</text:span><text:span text:style-name="T11"> </text:span><text:span text:style-name="T11">of</text:span><text:span text:style-name="T11"> </text:span><text:span text:style-name="T11">Economic</text:span><text:span text:style-name="T12"><text:line-break/></text:span><text:span text:style-name="T11">Literature,</text:span><text:span text:style-name="T11"> </text:span><text:span text:style-name="T11">46</text:span><text:span text:style-name="T9">(4),</text:span><text:span text:style-name="T10"> </text:span><text:span text:style-name="T9">910-945. </text:span><text:a xlink:type="simple" xlink:href="https://doi.org/10.1257/jel.46.4.910" text:style-name="Internet_20_link" text:visited-style-name="Visited_20_Internet_20_Link"><text:span text:style-name="T9">https://doi.org/10.1257/jel.46.4.910</text:span></text:a></text:p>
      <text:p text:style-name="P7"/>
      <text:p text:style-name="P8"><text:span text:style-name="T13">DOI: </text:span>10.1257/jel.46.4.910</text:p>
      <text:p text:style-name="P6"/>
      <text:p text:style-name="P6"/>
      <text:p text:style-name="P6"/>
      <text:p text:style-name="P6">Backward references <text:span text:style-name="T14">(citation might be wrong!)</text:span>:</text:p>
      <text:p text:style-name="P4"/>
      <text:p text:style-name="P4">Amato, J. D., Morris, S., &amp; Shin, H. S. (2002). Communication and monetary policy. <text:span text:style-name="Emphasis">Oxford Review of Economic Policy, 18</text:span>(4), 495–503.</text:p>
      <text:p text:style-name="P4"/>
      <text:p text:style-name="P5">Found <text:span text:style-name="T2">with</text:span> Google scholar</text:p>
      <text:p text:style-name="P5"/>
      <text:p text:style-name="P5"/>
      <text:p text:style-name="P5">Andersson, Malin, Hans Dillén, and Peter Sellin. 2006. “Monetary Policy Signaling and Movements in the Term Structure of Interest Rates.” <text:span text:style-name="Emphasis">Journal of Monetary Economics, 53</text:span>(8): 1815–55.</text:p>
      <text:p text:style-name="P5"/>
      <text:p text:style-name="P9">Found <text:span text:style-name="T2">with</text:span> Google scholar</text:p>
      <text:p text:style-name="P5"/>
      <text:p text:style-name="P5"><text:soft-page-break/></text:p>
      <text:p text:style-name="P5"/>
      <text:p text:style-name="P5"/>
      <text:p text:style-name="P5">Angeriz, Alvaro, and Philip Arestis. 2008. “Assessing Inflation Targeting through Intervention Analysis.” <text:span text:style-name="Emphasis">Oxford Economic Papers, 60</text:span>(2): 293–317.</text:p>
      <text:p text:style-name="P5"/>
      <text:p text:style-name="P9">Don’t have access</text:p>
      <text:p text:style-name="P5"/>
      <text:p text:style-name="P5"/>
      <text:p text:style-name="P5"/>
      <text:p text:style-name="P5">Archer, David. 2004. “Communication with the Public.” In <text:span text:style-name="Emphasis">Practical Experience with Inflation Targeting</text:span>, 145–55. Prague: Czech National Bank.</text:p>
      <text:p text:style-name="P5"/>
      <text:p text:style-name="P10">Didn’t find it :(</text:p>
      <text:p text:style-name="P11">After some digging found it on the Czech National Bank <text:a xlink:type="simple" xlink:href="https://www.cnb.cz/en/search/" text:style-name="Internet_20_link" text:visited-style-name="Visited_20_Internet_20_Link">site</text:a></text:p>
      <text:p text:style-name="P5"/>
      <text:p text:style-name="P5"/>
      <text:p text:style-name="P5"/>
      <text:p text:style-name="P5">Ball, Laurence, and Niamh Sheridan. 2005. “Does Inflation Targeting Matter?” In <text:span text:style-name="Emphasis">The Inflation-Targeting Debate</text:span>, ed. Ben S. Bernanke and Michael Woodford, 249–76. Chicago and London: University of Chicago Press.</text:p>
      <text:p text:style-name="P5"/>
      <text:p text:style-name="P10">Found with Google schola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5T20:47:16.660131935</meta:creation-date>
    <dc:date>2025-10-15T22:11:35.343269480</dc:date>
    <meta:editing-duration>PT20M24S</meta:editing-duration>
    <meta:editing-cycles>2</meta:editing-cycles>
    <meta:generator>LibreOffice/25.2.6.2$Linux_X86_64 LibreOffice_project/520$Build-2</meta:generator>
    <meta:document-statistic meta:table-count="0" meta:image-count="0" meta:object-count="0" meta:page-count="2" meta:paragraph-count="23" meta:word-count="250" meta:character-count="1671" meta:non-whitespace-character-count="1441"/>
  </office:meta>
</office:document-meta>
</file>